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10000025FEECAD8CDF0667324.png" manifest:media-type="image/png"/>
  <manifest:file-entry manifest:full-path="Pictures/10000001000002D10000033B413FE6EBC2C44987.png" manifest:media-type="image/png"/>
  <manifest:file-entry manifest:full-path="Pictures/10000001000003B800000389AB3107046C9861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b93b7" officeooo:paragraph-rsid="001b93b7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fo:font-weight="bold" officeooo:rsid="001b93b7" officeooo:paragraph-rsid="001b93b7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</text:p>
      <text:p text:style-name="P2"><draw:frame draw:style-name="fr2" draw:name="Image1" text:anchor-type="char" svg:x="0cm" svg:y="0.101cm" svg:width="17cm" svg:height="16.161cm" draw:z-index="0"><draw:image xlink:href="Pictures/10000001000003B800000389AB3107046C9861D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2" draw:name="Image2" text:anchor-type="char" svg:x="0cm" svg:y="0.085cm" svg:width="17cm" svg:height="19.498cm" draw:z-index="1"><draw:image xlink:href="Pictures/10000001000002D10000033B413FE6EBC2C4498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width="17cm" svg:height="14.312cm" draw:z-index="2"><draw:image xlink:href="Pictures/10000001000002D10000025FEECAD8CDF066732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54:47.835952625</meta:creation-date>
    <dc:date>2024-03-19T22:59:39.999302964</dc:date>
    <meta:editing-duration>PT4M52S</meta:editing-duration>
    <meta:editing-cycles>1</meta:editing-cycles>
    <meta:document-statistic meta:table-count="0" meta:image-count="3" meta:object-count="0" meta:page-count="3" meta:paragraph-count="1" meta:word-count="2" meta:character-count="12" meta:non-whitespace-character-count="11"/>
    <meta:generator>LibreOffice/7.3.7.2$Linux_X86_64 LibreOffice_project/30$Build-2</meta:generator>
  </office:meta>
</office:document-meta>
</file>